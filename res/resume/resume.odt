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DC000005DCCD8D0AD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First_20_Paragraph">
      <style:text-properties officeooo:paragraph-rsid="0016fcdb"/>
    </style:style>
    <style:style style:name="P2" style:family="paragraph" style:parent-style-name="Text_20_body">
      <style:text-properties officeooo:paragraph-rsid="0016fcdb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 style:parent-style-name="First_20_Paragraph">
      <style:text-properties fo:font-size="10.5pt" style:font-size-asian="10.5pt" style:font-size-complex="10.5pt"/>
    </style:style>
    <style:style style:name="P5" style:family="paragraph" style:parent-style-name="Standard">
      <style:text-properties officeooo:paragraph-rsid="000d4ea9"/>
    </style:style>
    <style:style style:name="P6" style:family="paragraph" style:parent-style-name="Heading_20_2">
      <style:text-properties officeooo:paragraph-rsid="000d4ea9"/>
    </style:style>
    <style:style style:name="P7" style:family="paragraph" style:parent-style-name="Text_20_body">
      <style:text-properties officeooo:paragraph-rsid="000e88b4"/>
    </style:style>
    <style:style style:name="P8" style:family="paragraph" style:parent-style-name="Standard">
      <style:text-properties officeooo:paragraph-rsid="000e88b4"/>
    </style:style>
    <style:style style:name="P9" style:family="paragraph" style:parent-style-name="Heading_20_2">
      <style:text-properties officeooo:paragraph-rsid="000e88b4"/>
    </style:style>
    <style:style style:name="P10" style:family="paragraph" style:parent-style-name="Compact" style:list-style-name="WWNum1001">
      <style:text-properties fo:font-size="10.5pt" style:font-size-asian="10.5pt" style:font-size-complex="10.5pt"/>
    </style:style>
    <style:style style:name="P11" style:family="paragraph" style:parent-style-name="Compact" style:list-style-name="WWNum1002">
      <style:text-properties fo:font-size="10.5pt" style:font-size-asian="10.5pt" style:font-size-complex="10.5pt"/>
    </style:style>
    <style:style style:name="P12" style:family="paragraph" style:parent-style-name="Compact" style:list-style-name="WWNum1003">
      <style:text-properties fo:font-size="10.5pt" style:font-size-asian="10.5pt" style:font-size-complex="10.5pt"/>
    </style:style>
    <style:style style:name="P13" style:family="paragraph" style:parent-style-name="Compact" style:list-style-name="WWNum1004">
      <style:text-properties fo:font-size="10.5pt" style:font-size-asian="10.5pt" style:font-size-complex="10.5pt"/>
    </style:style>
    <style:style style:name="P14" style:family="paragraph" style:parent-style-name="First_20_Paragraph">
      <style:text-properties officeooo:paragraph-rsid="000f6d2e"/>
    </style:style>
    <style:style style:name="P15" style:family="paragraph" style:parent-style-name="Text_20_body">
      <style:text-properties fo:font-size="9pt" fo:font-style="italic" officeooo:rsid="000d4ea9" officeooo:paragraph-rsid="00100f09" style:font-size-asian="7.84999990463257pt" style:font-style-asian="italic" style:font-size-complex="9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.5pt" fo:font-style="italic" style:font-size-asian="10.5pt" style:font-style-asian="italic" style:font-size-complex="10.5pt" style:font-style-complex="italic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officeooo:rsid="00122b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1201in, 3.1201in, 3.1201in, 3.1201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in" svg:stroke-color="#000000" draw:stroke-linejoin="round" svg:stroke-linecap="butt" draw:fill="solid" draw:fill-color="#ffffff" draw:textarea-horizontal-align="center" draw:textarea-vertical-align="top" draw:auto-grow-height="false" loext:decorative="tru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solid" svg:stroke-width="0in" svg:stroke-color="#000000" draw:stroke-linejoin="round" svg:stroke-linecap="butt" draw:fill="solid" draw:fill-color="#ffffff" draw:textarea-horizontal-align="center" draw:textarea-vertical-align="top" draw:auto-grow-height="false" loext:decorative="tru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uzair-anwar-shaikh"/>UZAIR ANWAR SHAIKH<draw:frame draw:style-name="fr1" draw:name="Image1" text:anchor-type="char" svg:x="4.9484in" svg:y="0.1382in" svg:width="1.1701in" svg:height="1.1701in" draw:z-index="7"><draw:image xlink:href="Pictures/10000000000005DC000005DCCD8D0AD1.jpg" xlink:type="simple" xlink:show="embed" xlink:actuate="onLoad" draw:mime-type="image/jpeg"/><svg:title>Qr Code</svg:title><svg:desc>Qr code for visiliting Uzair shaikh's website</svg:desc></draw:frame></text:h>
      <text:p text:style-name="P1"><text:span text:style-name="T1">Mumbai, Maharashtra</text:span><text:line-break/>+91 76669 44215 | <text:a xlink:type="simple" xlink:href="mailto:uzairshaikhking777@gmail.com" office:name="Email address" text:style-name="Internet_20_link" text:visited-style-name="Visited_20_Internet_20_Link">uzairshaikhking777@gmail.com</text:a></text:p>
      <text:p text:style-name="P2"/>
      <text:p text:style-name="P1"><draw:rect text:anchor-type="as-char" style:rel-width="100%" draw:z-index="0" draw:name="Shape1" draw:style-name="gr1" draw:text-style-name="P3" svg:width="6.5004in" svg:height="0.0213in"><text:p/></draw:rect></text:p>
      <text:h text:style-name="Heading_20_2" text:outline-level="2">GOAL<text:bookmark-start text:name="objective"/></text:h>
      <text:p text:style-name="P4">Dedicated and enthusiastic Computer Science and Engineering student specializing in Blockchain, IoT, and Cybersecurity, eager to apply technical expertise and analytical skills to real-world challenges. Seeking opportunities to gain hands-on experience, enhance knowledge, and contribute to organizational growth.</text:p>
      <text:p text:style-name="Standard"><draw:rect text:anchor-type="as-char" style:rel-width="100%" draw:z-index="1" draw:name="Shape2" draw:style-name="gr1" draw:text-style-name="P3" svg:width="6.5004in" svg:height="0.0213in"><text:p/></draw:rect><text:bookmark-end text:name="objective"/></text:p>
      <text:h text:style-name="Heading_20_2" text:outline-level="2"><text:bookmark-start text:name="education"/>EDUCATION</text:h>
      <text:p text:style-name="First_20_Paragraph"><text:span text:style-name="T1">Bachelor of Engineering in Computer Science and Engineering</text:span><text:line-break/><text:span text:style-name="T2">Major: Blockchain, IoT &amp; Cybersecurity</text:span><text:span text:style-name="T3"><text:line-break/>2024 – 2027 (Pursuing)</text:span></text:p>
      <text:p text:style-name="Text_20_body"><text:span text:style-name="T1">Diploma in Computer Engineering</text:span><text:line-break/><text:span text:style-name="T3">Vidyalankar Polytechnic, Mumbai<text:line-break/>2021 – 2024 (Completed)</text:span></text:p>
      <text:p text:style-name="P5"><draw:rect text:anchor-type="as-char" style:rel-width="100%" draw:z-index="2" draw:name="Shape3" draw:style-name="gr1" draw:text-style-name="P3" svg:width="6.5004in" svg:height="0.0213in"><text:p/></draw:rect><text:bookmark-end text:name="education"/></text:p>
      <text:h text:style-name="P6" text:outline-level="2"><text:bookmark-start text:name="technical-skills"/>TECHNICAL SKILLS</text:h>
      <text:p text:style-name="First_20_Paragraph"><text:span text:style-name="T1">Programming Languages:</text:span> <text:span text:style-name="T3">Python, SQL, Shell (Bash &amp; PowerShell)</text:span></text:p>
      <text:p text:style-name="Text_20_body"><text:span text:style-name="T1">Operating Systems:</text:span> <text:span text:style-name="T3">Linux (Ubuntu/Fedora) - Advanced proficiency, Windows - Intermediate</text:span></text:p>
      <text:p text:style-name="Text_20_body"><text:span text:style-name="T1">Server Management:</text:span> <text:span text:style-name="T3">Deployment and maintenance of Linux and Windows server environments</text:span></text:p>
      <text:p text:style-name="Text_20_body"><text:span text:style-name="T1">Hardware:</text:span> <text:span text:style-name="T3">Hardware installation, configuration, and maintenance</text:span></text:p>
      <text:p text:style-name="Text_20_body"><text:span text:style-name="T1">Software Management:</text:span> <text:span text:style-name="T3">Software installation, configuration, and deployment across multiple platforms</text:span></text:p>
      <text:p text:style-name="Text_20_body"><text:span text:style-name="T1">Web Technologies:</text:span> <text:span text:style-name="T3">HTML, CSS, Back-end Scripting (Basic)</text:span></text:p>
      <text:p text:style-name="P7"><text:span text:style-name="T1">Cybersecurity:</text:span> <text:span text:style-name="T3">Threat analysis, Network security principles</text:span></text:p>
      <text:p text:style-name="P8"><text:span text:style-name="T3"><draw:rect text:anchor-type="as-char" draw:z-index="8" draw:name="Shape 1" draw:style-name="gr2" draw:text-style-name="P3" svg:width="6.5004in" svg:height="0.0213in"><text:p/></draw:rect></text:span><text:bookmark-end text:name="technical-skills"/></text:p>
      <text:h text:style-name="P9" text:outline-level="2"><text:soft-page-break/></text:h>
      <text:h text:style-name="P9" text:outline-level="2"><text:bookmark-start text:name="certifications"/>CERTIFICATIONS</text:h>
      <text:list xml:id="list4011283285" text:style-name="WWNum1001">
        <text:list-item>
          <text:p text:style-name="P10">SQL Programming Certification</text:p>
        </text:list-item>
        <text:list-item>
          <text:p text:style-name="P10">Cybersecurity Beginner Certification</text:p>
          <text:p text:style-name="P10"/>
        </text:list-item>
      </text:list>
      <text:p text:style-name="Standard"><draw:rect text:anchor-type="as-char" style:rel-width="100%" draw:z-index="3" draw:name="Shape5" draw:style-name="gr1" draw:text-style-name="P3" svg:width="6.5004in" svg:height="0.0213in"><text:p/></draw:rect><text:bookmark-end text:name="certifications"/></text:p>
      <text:h text:style-name="Heading_20_2" text:outline-level="2"><text:bookmark-start text:name="areas-of-interest"/>AREAS OF INTEREST</text:h>
      <text:list xml:id="list201126670886702" text:continue-list="list4011283285" text:style-name="WWNum1002">
        <text:list-item>
          <text:p text:style-name="P11">Back-end Development &amp; Maintenance</text:p>
        </text:list-item>
        <text:list-item>
          <text:p text:style-name="P11">System Security and Fault Analysis</text:p>
        </text:list-item>
        <text:list-item>
          <text:p text:style-name="P11">IoT Systems and Blockchain Applications</text:p>
          <text:p text:style-name="P11"/>
        </text:list-item>
      </text:list>
      <text:p text:style-name="Standard"><draw:rect text:anchor-type="as-char" style:rel-width="100%" draw:z-index="4" draw:name="Shape6" draw:style-name="gr1" draw:text-style-name="P3" svg:width="6.5004in" svg:height="0.0213in"><text:p/></draw:rect><text:bookmark-end text:name="areas-of-interest"/></text:p>
      <text:h text:style-name="Heading_20_2" text:outline-level="2"><text:bookmark-start text:name="computer-proficiency"/>COMPUTER PROFICIENCY</text:h>
      <text:list xml:id="list201127498464614" text:continue-list="list201126670886702" text:style-name="WWNum1003">
        <text:list-item>
          <text:p text:style-name="P12">Experienced in configuring and maintaining multi-platform server environments</text:p>
        </text:list-item>
        <text:list-item>
          <text:p text:style-name="P12">Proficient in hardware installation, troubleshooting, and maintenance</text:p>
        </text:list-item>
        <text:list-item>
          <text:p text:style-name="P12">Skilled in software installation, configuration, and deployment across Linux and Windows platforms</text:p>
        </text:list-item>
        <text:list-item>
          <text:p text:style-name="P12">Strong expertise in Linux system administration with advanced command-line proficiency</text:p>
        </text:list-item>
        <text:list-item>
          <text:p text:style-name="P12">Comfortable working in various IDEs and production environments (VS Code, PyCharm, terminal editors)</text:p>
          <text:p text:style-name="P12"/>
        </text:list-item>
      </text:list>
      <text:p text:style-name="Standard"><draw:rect text:anchor-type="as-char" style:rel-width="100%" draw:z-index="5" draw:name="Shape7" draw:style-name="gr1" draw:text-style-name="P3" svg:width="6.5004in" svg:height="0.0213in"><text:p/></draw:rect><text:bookmark-end text:name="computer-proficiency"/></text:p>
      <text:h text:style-name="Heading_20_2" text:outline-level="2"><text:bookmark-start text:name="personal-attributes"/>PERSONAL ATTRIBUTES</text:h>
      <text:list text:continue-list="list201127498464614" text:style-name="WWNum1004">
        <text:list-item>
          <text:p text:style-name="P13">Quick learner and detail-oriented</text:p>
        </text:list-item>
        <text:list-item>
          <text:p text:style-name="P13">Strong analytical and problem-solving skills</text:p>
        </text:list-item>
        <text:list-item>
          <text:p text:style-name="P13">Adaptable, curious, and collaborative team player</text:p>
          <text:p text:style-name="P13"/>
        </text:list-item>
      </text:list>
      <text:p text:style-name="Standard"><draw:rect text:anchor-type="as-char" style:rel-width="100%" draw:z-index="6" draw:name="Shape8" draw:style-name="gr1" draw:text-style-name="P3" svg:width="6.5004in" svg:height="0.0213in"><text:p/></draw:rect><text:bookmark-end text:name="personal-attributes"/></text:p>
      <text:h text:style-name="Heading_20_2" text:outline-level="2"><text:bookmark-start text:name="portfolio"/>PORTFOLIO</text:h>
      <text:p text:style-name="P14"><text:span text:style-name="T1">Website:</text:span> <text:span text:style-name="T3">https://uzairshaikh.pages.dev/</text:span></text:p>
      <text:p text:style-name="P15"><text:bookmark-end text:name="uzair-anwar-shaikh"/><text:bookmark-end text:name="portfolio"/><text:s/><text:span text:style-name="T4">PS : Scan the QR Code on the front page to visit my websit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1252in" fo:margin-bottom="0.1252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in" fo:margin-bottom="0.0835in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252in" fo:margin-bottom="0.0252in" style:contextual-spacing="false"/>
    </style:style>
    <style:style style:name="Title" style:family="paragraph" style:parent-style-name="Standard" style:next-style-name="Text_20_body" style:class="chapter">
      <style:paragraph-properties fo:margin-top="0.3335in" fo:margin-bottom="0.1665in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Cambria1" style:font-family-asian="Cambria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>
        <loext:char-complex-color loext:theme-type="accent1" loext:color-type="theme">
          <loext:transformation loext:type="shade" loext:value="2901"/>
        </loext:char-complex-color>
      </style:text-properties>
    </style:style>
    <style:style style:name="Subtitle" style:family="paragraph" style:parent-style-name="Title" style:next-style-name="Text_20_body" style:class="chapter">
      <style:paragraph-properties fo:margin-top="0.1665in" fo:margin-bottom="0.1665in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Abstract" style:family="paragraph" style:parent-style-name="Standard" style:next-style-name="Text_20_body">
      <style:paragraph-properties fo:margin-top="0.2083in" fo:margin-bottom="0.2083in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6pt" fo:font-weight="bold" style:font-name-asian="Cambria1" style:font-family-asian="Cambria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>
        <loext:char-complex-color loext:theme-type="accent1" loext:color-type="theme"/>
      </style:text-properties>
    </style:style>
    <style:style style:name="Heading_20_2" style:display-name="Heading 2" style:family="paragraph" style:parent-style-name="Standard" style:next-style-name="Text_20_body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Text_20_body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weight="bold" style:font-name-asian="Cambria1" style:font-family-asian="Cambria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Text_20_body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Text_20_body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Heading_20_6" style:display-name="Heading 6" style:family="paragraph" style:parent-style-name="Standard" style:next-style-name="Text_20_body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7" style:display-name="Heading 7" style:family="paragraph" style:parent-style-name="Standard" style:next-style-name="Text_20_body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8" style:display-name="Heading 8" style:family="paragraph" style:parent-style-name="Standard" style:next-style-name="Text_20_body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Text_20_body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Block_20_Text" style:display-name="Block Text" style:family="paragraph" style:parent-style-name="Text_20_body" style:next-style-name="Text_20_body">
      <style:paragraph-properties fo:margin-left="0.3335in" fo:margin-right="0.3335in" fo:margin-top="0.0693in" fo:margin-bottom="0.0693in" style:contextual-spacing="false" fo:text-indent="0in" style:auto-text-indent="false"/>
    </style:style>
    <style:style style:name="Footnote" style:family="paragraph" style:parent-style-name="Standard" style:class="extra"/>
    <style:style style:name="Definition_20_Term" style:display-name="Definition Term" style:family="paragraph" style:parent-style-name="Standard" style:next-style-name="Definition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1665in" fo:margin-bottom="0in" style:contextual-spacing="false" fo:line-height="108%"/>
      <style:text-properties fo:color="#365f91" loext:opacity="100%" style:font-name="Calibri" fo:font-family="Calibri" style:font-family-generic="roman" style:font-pitch="variable" fo:font-weight="normal" style:font-name-asian="Cambria1" style:font-family-asian="Cambria" style:font-family-generic-asian="system" style:font-pitch-asian="variable" style:font-weight-asian="normal" style:font-name-complex="DejaVu Sans" style:font-family-complex="'DejaVu Sans'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 loext:linked-style-name="Verbatim_20_Char"/>
    <style:style style:name="Default_20_Paragraph_20_Font_20__28_WW_29_" style:display-name="Default Paragraph Font (WW)" style:family="text"/>
    <style:style style:name="Body_20_Text_20_Char" style:display-name="Body Text Char" style:family="text" style:parent-style-name="Default_20_Paragraph_20_Font_20__28_WW_29_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1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11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13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15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17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2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20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22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24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26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3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29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31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33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35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4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38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40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42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44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1970-01-01T00:00:00</meta:creation-date>
    <dc:date>2026-06-25T20:11:25.611421546</dc:date>
    <meta:generator>LibreOffice/26.2.4.2$Linux_X86_64 LibreOffice_project/620$Build-2</meta:generator>
    <meta:editing-duration>PT28M13S</meta:editing-duration>
    <meta:editing-cycles>11</meta:editing-cycles>
    <meta:print-date>2026-06-25T20:07:32.148258054</meta:print-date>
    <meta:printed-by>PDF files</meta:printed-by>
    <dc:title>Uzair Shaikh's portfolio</dc:title>
    <meta:document-statistic meta:table-count="0" meta:image-count="1" meta:object-count="0" meta:page-count="2" meta:paragraph-count="47" meta:word-count="270" meta:character-count="2133" meta:non-whitespace-character-count="1913"/>
    <meta:user-defined meta:name="AppVersion">12.0000</meta:user-defined>
    <meta:template xlink:type="simple" xlink:actuate="onRequest" xlink:title="Normal.dotm" xlink:href=""/>
  </office:meta>
</office:document-meta>
</file>